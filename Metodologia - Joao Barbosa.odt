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ed66"/>
    </style:style>
    <style:style style:name="P2" style:family="paragraph" style:parent-style-name="Preformatted_20_Text">
      <style:text-properties fo:background-color="transparent"/>
    </style:style>
    <style:style style:name="P3" style:family="paragraph" style:parent-style-name="Preformatted_20_Text">
      <style:text-properties officeooo:paragraph-rsid="001ced66" fo:background-color="transparent"/>
    </style:style>
    <style:style style:name="T1" style:family="text">
      <style:text-properties officeooo:rsid="001b5efa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b9125"/>
    </style:style>
    <style:style style:name="T4" style:family="text">
      <style:text-properties style:font-name="Liberation Mono" fo:font-size="10pt" officeooo:rsid="001bbb67" fo:background-color="transparent" loext:char-shading-value="0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e3e45" style:font-name-asian="Noto Sans Mono CJK SC" style:font-size-asian="10pt" style:font-name-complex="Liberation Mono" style:font-size-complex="10pt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bbb67" fo:background-color="transparent" loext:char-shading-value="0"/>
    </style:style>
    <style:style style:name="T8" style:family="text">
      <style:text-properties officeooo:rsid="001ced66" fo:background-color="transparent" loext:char-shading-value="0"/>
    </style:style>
    <style:style style:name="T9" style:family="text">
      <style:text-properties officeooo:rsid="001ced66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font-style="italic" fo:background-color="transparent" loext:char-shading-value="0"/>
    </style:style>
    <style:style style:name="T12" style:family="text">
      <style:text-properties officeooo:rsid="001e3e45"/>
    </style:style>
    <style:style style:name="T13" style:family="text">
      <style:text-properties fo:color="#c9211e" loext:opacity="100%" officeooo:rsid="0022623a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</text:p>
      <text:p text:style-name="Preformatted_20_Text">description: Metodologia e padrões de desenvolvimento da Prottus</text:p>
      <text:p text:style-name="Preformatted_20_Text">alwaysApply: true</text:p>
      <text:p text:style-name="Preformatted_20_Text">---</text:p>
      <text:p text:style-name="Preformatted_20_Text"/>
      <text:p text:style-name="Preformatted_20_Text"># Metodologia de Desenvolvimento – Prottus – <text:span text:style-name="T12">Jo</text:span><text:span text:style-name="T5">ão Barbosa</text:span></text:p>
      <text:p text:style-name="Preformatted_20_Text"/>
      <text:p text:style-name="Preformatted_20_Text">## Princípios Fundamentais</text:p>
      <text:p text:style-name="Preformatted_20_Text"/>
      <text:p text:style-name="Preformatted_20_Text">### 1. Segurança (Prioridade Máxima)</text:p>
      <text:p text:style-name="Preformatted_20_Text">- **Nunca** commitar credenciais, senhas ou tokens no código</text:p>
      <text:p text:style-name="Preformatted_20_Text">- Usar variáveis de ambiente para informações sensíveis</text:p>
      <text:p text:style-name="Preformatted_20_Text">- Validar e sanitizar todas as entradas de dados</text:p>
      <text:p text:style-name="Preformatted_20_Text">- Implementar autenticação e autorização adequadas</text:p>
      <text:p text:style-name="Preformatted_20_Text">- Usar conexões criptografadas (HTTPS, SSL/TLS)</text:p>
      <text:p text:style-name="Preformatted_20_Text">- Implementar rate limiting em APIs</text:p>
      <text:p text:style-name="Preformatted_20_Text">- Logs não devem conter informações sensíveis</text:p>
      <text:p text:style-name="Preformatted_20_Text">- Revisar dependências regularmente para vulnerabilidades</text:p>
      <text:p text:style-name="Preformatted_20_Text"/>
      <text:p text:style-name="Preformatted_20_Text">### 2. Simplicidade (Prioridade Alta)</text:p>
      <text:p text:style-name="Preformatted_20_Text">- Código deve ser fácil de ler e entender</text:p>
      <text:p text:style-name="Preformatted_20_Text">- Evitar over-engineering</text:p>
      <text:p text:style-name="Preformatted_20_Text">- Preferir soluções diretas e claras</text:p>
      <text:p text:style-name="Preformatted_20_Text">- Quando a simplicidade comprometer muito a performance, discutir alternativas</text:p>
      <text:p text:style-name="Preformatted_20_Text">- Documentar decisões complexas quando necessárias</text:p>
      <text:p text:style-name="Preformatted_20_Text"/>
      <text:p text:style-name="Preformatted_20_Text">### 3. Padrões de Linguagem</text:p>
      <text:p text:style-name="Preformatted_20_Text">- Seguir os padrões oficiais de cada linguagem</text:p>
      <text:p text:style-name="Preformatted_20_Text">- Manter consistência de estilo no projeto</text:p>
      <text:p text:style-name="Preformatted_20_Text">- Seguir convenções de nomenclatura da linguagem</text:p>
      <text:p text:style-name="Preformatted_20_Text"/>
      <text:p text:style-name="Preformatted_20_Text">### 4. Documentação de Código</text:p>
      <text:p text:style-name="Preformatted_20_Text">- **Toda função deve ter um comentário/<text:span text:style-name="T9">javadoc</text:span> explicando seu objetivo**</text:p>
      <text:p text:style-name="Preformatted_20_Text">- Comentários devem ser claros e objetivos, sem ser prolixos</text:p>
      <text:p text:style-name="P1">- Em <text:span text:style-name="T1">Java</text:span>, <text:span text:style-name="T6">usar </text:span><text:span text:style-name="T7">padr</text:span><text:span text:style-name="T4">ão Javadoc</text:span><text:span text:style-name="T6"> </text:span><text:span text:style-name="T10">(/</text:span><text:span text:style-name="T6"> ... </text:span><text:span text:style-name="T11">/)</text:span><text:span text:style-name="T6"> para documentar funções e classes</text:span></text:p>
      <text:p text:style-name="Preformatted_20_Text">- Documentar parâmetros <text:span text:style-name="T6">(</text:span><text:span text:style-name="T8">@param</text:span><text:span text:style-name="T6">) e retornos (</text:span><text:span text:style-name="T8">@return</text:span><text:span text:style-name="T6">) </text:span>quando não forem óbvios</text:p>
      <text:p text:style-name="Preformatted_20_Text">- Evitar comentários que apenas repetem o código</text:p>
      <text:p text:style-name="Preformatted_20_Text">- Priorizar código autoexplicativo, comentar apenas quando necessário para clareza</text:p>
      <text:p text:style-name="Preformatted_20_Text">- Exemplo de boa documentação:</text:p>
      <text:p text:style-name="Preformatted_20_Text">```<text:span text:style-name="T9">java</text:span></text:p>
      <text:p text:style-name="P3">/**</text:p>
      <text:p text:style-name="P3"><text:s/>* Processa dados de uma reserva coletada do PMS.</text:p>
      <text:p text:style-name="P3"><text:s/>*</text:p>
      <text:p text:style-name="P3"><text:s/>* @param data Mapa contendo os dados brutos da reserva no formato do PMS.</text:p>
      <text:p text:style-name="P3"><text:s/>* @return Um Map com os dados processados no formato para o Datalake.</text:p>
      <text:p text:style-name="P3"><text:s/>*/</text:p>
      <text:p text:style-name="P3">public Map&lt;String, Object&gt; processReservation(Map&lt;String, Object&gt; data) {</text:p>
      <text:p text:style-name="P3"><text:s text:c="4"/>// Lógica de processamento aqui<text:tab/></text:p>
      <text:p text:style-name="P3">}</text:p>
      <text:p text:style-name="Preformatted_20_Text">```</text:p>
      <text:p text:style-name="Preformatted_20_Text"/>
      <text:p text:style-name="Preformatted_20_Text">## Boas Práticas para Trabalho em Equipe</text:p>
      <text:p text:style-name="Preformatted_20_Text"/>
      <text:p text:style-name="Preformatted_20_Text">### Estrutura de Projetos</text:p>
      <text:p text:style-name="Preformatted_20_Text">- Manter estrutura de diretórios clara e organizada</text:p>
      <text:p text:style-name="Preformatted_20_Text">- Separar responsabilidades em módulos/arquivos distintos</text:p>
      <text:p text:style-name="Preformatted_20_Text">- Documentar APIs e funções complexas</text:p>
      <text:p text:style-name="Preformatted_20_Text">- Manter README.md atualizado com instruções de setup</text:p>
      <text:p text:style-name="Preformatted_20_Text"/>
      <text:p text:style-name="Preformatted_20_Text"><text:soft-page-break/>### Versionamento</text:p>
      <text:p text:style-name="Preformatted_20_Text">- Commits descritivos e objetivos</text:p>
      <text:p text:style-name="Preformatted_20_Text">- Usar branches para features e correções</text:p>
      <text:p text:style-name="Preformatted_20_Text">- Não commitar arquivos temporários ou sensíveis</text:p>
      <text:p text:style-name="Preformatted_20_Text">- Manter `.gitignore` atualizado</text:p>
      <text:p text:style-name="Preformatted_20_Text"/>
      <text:p text:style-name="Preformatted_20_Text">### Tratamento de Erros</text:p>
      <text:p text:style-name="Preformatted_20_Text">- Sempre tratar erros explicitamente</text:p>
      <text:p text:style-name="Preformatted_20_Text">- Logs informativos para debugging</text:p>
      <text:p text:style-name="Preformatted_20_Text">- Mensagens de erro claras para o usuário final</text:p>
      <text:p text:style-name="Preformatted_20_Text">- Não silenciar erros sem tratamento adequado</text:p>
      <text:p text:style-name="Preformatted_20_Text"/>
      <text:p text:style-name="Preformatted_20_Text">### Testes</text:p>
      <text:p text:style-name="Preformatted_20_Text">- Testar funcionalidades críticas</text:p>
      <text:p text:style-name="Preformatted_20_Text">- Manter testes simples e focados</text:p>
      <text:p text:style-name="Preformatted_20_Text">- Testar casos de erro e edge cases</text:p>
      <text:p text:style-name="Preformatted_20_Text"/>
      <text:p text:style-name="Preformatted_20_Text">### Performance</text:p>
      <text:p text:style-name="Preformatted_20_Text">- Otimizar apenas quando necessário</text:p>
      <text:p text:style-name="Preformatted_20_Text">- Medir antes de otimizar</text:p>
      <text:p text:style-name="Preformatted_20_Text">- Priorizar simplicidade, otimizar apenas se impactar significativamente</text:p>
      <text:p text:style-name="Preformatted_20_Text"/>
      <text:p text:style-name="Preformatted_20_Text">## Tecnologias Utilizadas</text:p>
      <text:p text:style-name="Preformatted_20_Text">- **Banco de Dados**: <text:span text:style-name="T12">MySQL</text:span></text:p>
      <text:p text:style-name="Preformatted_20_Text">- **Linguagem**: <text:span text:style-name="T3">Java </text:span><text:span text:style-name="T12">8</text:span></text:p>
      <text:p text:style-name="P2">- Seguir as convenções de código da Oracle para Java</text:p>
      <text:p text:style-name="Preformatted_20_Text">- Utilizar Generics e Tipagem Forte para garantir a segurança do código</text:p>
      <text:p text:style-name="Preformatted_20_Text"/>
      <text:p text:style-name="Preformatted_20_Text">## Comunicação com IA</text:p>
      <text:p text:style-name="Preformatted_20_Text">- Ser claro e específico nas solicitações</text:p>
      <text:p text:style-name="Preformatted_20_Text">- Revisar código gerado antes de commitar</text:p>
      <text:p text:style-name="Preformatted_20_Text">- Questionar decisões complexas quando necessário</text:p>
      <text:p text:style-name="Preformatted_20_Text">- Pedir explicações sobre código gerado quando não estiver cla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6T15:49:22.601536008</dc:date>
    <meta:editing-duration>PT1H39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78" meta:word-count="479" meta:character-count="3117" meta:non-whitespace-character-count="2704"/>
  </office:meta>
</office:document-meta>
</file>